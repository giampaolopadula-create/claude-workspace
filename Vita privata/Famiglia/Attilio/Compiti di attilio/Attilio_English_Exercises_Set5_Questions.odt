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1" style:family="table">
      <style:table-properties style:width="18.796cm" fo:margin-top="0cm" fo:margin-bottom="0cm" table:align="center" style:writing-mode="lr-tb"/>
    </style:style>
    <style:style style:name="表1.A" style:family="table-column">
      <style:table-column-properties style:column-width="18.796cm"/>
    </style:style>
    <style:style style:name="表1.1" style:family="table-row">
      <style:table-row-properties style:keep-together="false" fo:keep-together="always"/>
    </style:style>
    <style:style style:name="表1.A1" style:family="table-cell">
      <style:table-cell-properties style:vertical-align="" fo:background-color="#fff4e1" fo:padding-left="0.191cm" fo:padding-right="0.191cm" fo:padding-top="0cm" fo:padding-bottom="0cm" fo:border="none">
        <style:background-image/>
      </style:table-cell-properties>
    </style:style>
    <style:style style:name="表2" style:family="table">
      <style:table-properties style:width="18.796cm" fo:margin-top="0cm" fo:margin-bottom="0cm" table:align="center" style:writing-mode="lr-tb"/>
    </style:style>
    <style:style style:name="表2.A" style:family="table-column">
      <style:table-column-properties style:column-width="18.796cm"/>
    </style:style>
    <style:style style:name="表2.1" style:family="table-row">
      <style:table-row-properties style:keep-together="false" fo:keep-together="always"/>
    </style:style>
    <style:style style:name="表2.A1" style:family="table-cell">
      <style:table-cell-properties style:vertical-align="" fo:background-color="#eaf7ff" fo:padding-left="0.191cm" fo:padding-right="0.191cm" fo:padding-top="0cm" fo:padding-bottom="0cm" fo:border="none">
        <style:background-image/>
      </style:table-cell-properties>
    </style:style>
    <style:style style:name="表3" style:family="table">
      <style:table-properties style:width="18.796cm" fo:margin-top="0cm" fo:margin-bottom="0cm" table:align="center" style:writing-mode="lr-tb"/>
    </style:style>
    <style:style style:name="表3.A" style:family="table-column">
      <style:table-column-properties style:column-width="18.796cm"/>
    </style:style>
    <style:style style:name="表3.1" style:family="table-row">
      <style:table-row-properties style:keep-together="false" fo:keep-together="always"/>
    </style:style>
    <style:style style:name="表3.A1" style:family="table-cell">
      <style:table-cell-properties style:vertical-align="" fo:background-color="#f4ecff" fo:padding-left="0.191cm" fo:padding-right="0.191cm" fo:padding-top="0cm" fo:padding-bottom="0cm" fo:border="none">
        <style:background-image/>
      </style:table-cell-properties>
    </style:style>
    <style:style style:name="表4" style:family="table">
      <style:table-properties style:width="18.796cm" fo:margin-top="0cm" fo:margin-bottom="0cm" table:align="center" style:writing-mode="lr-tb"/>
    </style:style>
    <style:style style:name="表4.A" style:family="table-column">
      <style:table-column-properties style:column-width="18.796cm"/>
    </style:style>
    <style:style style:name="表4.1" style:family="table-row">
      <style:table-row-properties style:keep-together="false" fo:keep-together="always"/>
    </style:style>
    <style:style style:name="表4.A1" style:family="table-cell">
      <style:table-cell-properties style:vertical-align="" fo:background-color="#effff2" fo:padding-left="0.191cm" fo:padding-right="0.191cm" fo:padding-top="0cm" fo:padding-bottom="0cm" fo:border="none">
        <style:background-image/>
      </style:table-cell-properties>
    </style:style>
    <style:style style:name="表5" style:family="table">
      <style:table-properties style:width="18.796cm" fo:margin-top="0cm" fo:margin-bottom="0cm" table:align="center" style:writing-mode="lr-tb"/>
    </style:style>
    <style:style style:name="表5.A" style:family="table-column">
      <style:table-column-properties style:column-width="18.796cm"/>
    </style:style>
    <style:style style:name="表5.1" style:family="table-row">
      <style:table-row-properties style:keep-together="false" fo:keep-together="always"/>
    </style:style>
    <style:style style:name="表5.A1" style:family="table-cell">
      <style:table-cell-properties style:vertical-align="" fo:background-color="#fff0f6" fo:padding-left="0.191cm" fo:padding-right="0.191cm" fo:padding-top="0cm" fo:padding-bottom="0cm" fo:border="none">
        <style:background-image/>
      </style:table-cell-properties>
    </style:style>
    <style:style style:name="表6" style:family="table">
      <style:table-properties style:width="18.796cm" fo:margin-top="0cm" fo:margin-bottom="0cm" table:align="center" style:writing-mode="lr-tb"/>
    </style:style>
    <style:style style:name="表6.A" style:family="table-column">
      <style:table-column-properties style:column-width="18.796cm"/>
    </style:style>
    <style:style style:name="表6.1" style:family="table-row">
      <style:table-row-properties style:keep-together="false" fo:keep-together="always"/>
    </style:style>
    <style:style style:name="表6.A1" style:family="table-cell">
      <style:table-cell-properties style:vertical-align="" fo:background-color="#f3f3f3" fo:padding-left="0.191cm" fo:padding-right="0.191cm" fo:padding-top="0cm" fo:padding-bottom="0cm" fo:border="none">
        <style:background-image/>
      </style:table-cell-properties>
    </style:style>
    <style:style style:name="表7" style:family="table">
      <style:table-properties style:width="18.796cm" fo:margin-top="0cm" fo:margin-bottom="0cm" table:align="center" style:writing-mode="lr-tb"/>
    </style:style>
    <style:style style:name="表7.A" style:family="table-column">
      <style:table-column-properties style:column-width="18.796cm"/>
    </style:style>
    <style:style style:name="表7.1" style:family="table-row">
      <style:table-row-properties style:keep-together="false" fo:keep-together="always"/>
    </style:style>
    <style:style style:name="表7.A1" style:family="table-cell">
      <style:table-cell-properties style:vertical-align="" fo:background-color="#fff4e1" fo:padding-left="0.191cm" fo:padding-right="0.191cm" fo:padding-top="0cm" fo:padding-bottom="0cm" fo:border="none">
        <style:background-image/>
      </style:table-cell-properties>
    </style:style>
    <style:style style:name="表8" style:family="table">
      <style:table-properties style:width="18.796cm" fo:margin-top="0cm" fo:margin-bottom="0cm" table:align="center" style:writing-mode="lr-tb"/>
    </style:style>
    <style:style style:name="表8.A" style:family="table-column">
      <style:table-column-properties style:column-width="18.796cm"/>
    </style:style>
    <style:style style:name="表8.1" style:family="table-row">
      <style:table-row-properties style:keep-together="false" fo:keep-together="always"/>
    </style:style>
    <style:style style:name="表8.A1" style:family="table-cell">
      <style:table-cell-properties style:vertical-align="" fo:background-color="#eaf7ff" fo:padding-left="0.191cm" fo:padding-right="0.191cm" fo:padding-top="0cm" fo:padding-bottom="0cm" fo:border="none">
        <style:background-image/>
      </style:table-cell-properties>
    </style:style>
    <style:style style:name="表9" style:family="table">
      <style:table-properties style:width="18.796cm" fo:margin-top="0cm" fo:margin-bottom="0cm" table:align="center" style:writing-mode="lr-tb"/>
    </style:style>
    <style:style style:name="表9.A" style:family="table-column">
      <style:table-column-properties style:column-width="18.796cm"/>
    </style:style>
    <style:style style:name="表9.1" style:family="table-row">
      <style:table-row-properties style:keep-together="false" fo:keep-together="always"/>
    </style:style>
    <style:style style:name="表9.A1" style:family="table-cell">
      <style:table-cell-properties style:vertical-align="" fo:background-color="#f4ecff" fo:padding-left="0.191cm" fo:padding-right="0.191cm" fo:padding-top="0cm" fo:padding-bottom="0cm" fo:border="none">
        <style:background-image/>
      </style:table-cell-properties>
    </style:style>
    <style:style style:name="表10" style:family="table">
      <style:table-properties style:width="18.796cm" fo:margin-top="0cm" fo:margin-bottom="0cm" table:align="center" style:writing-mode="lr-tb"/>
    </style:style>
    <style:style style:name="表10.A" style:family="table-column">
      <style:table-column-properties style:column-width="18.796cm"/>
    </style:style>
    <style:style style:name="表10.1" style:family="table-row">
      <style:table-row-properties style:keep-together="false" fo:keep-together="always"/>
    </style:style>
    <style:style style:name="表10.A1" style:family="table-cell">
      <style:table-cell-properties style:vertical-align="" fo:background-color="#effff2" fo:padding-left="0.191cm" fo:padding-right="0.191cm" fo:padding-top="0cm" fo:padding-bottom="0cm" fo:border="none">
        <style:background-image/>
      </style:table-cell-properties>
    </style:style>
    <style:style style:name="表11" style:family="table">
      <style:table-properties style:width="18.796cm" fo:margin-top="0cm" fo:margin-bottom="0cm" table:align="center" style:writing-mode="lr-tb"/>
    </style:style>
    <style:style style:name="表11.A" style:family="table-column">
      <style:table-column-properties style:column-width="18.796cm"/>
    </style:style>
    <style:style style:name="表11.1" style:family="table-row">
      <style:table-row-properties style:keep-together="false" fo:keep-together="always"/>
    </style:style>
    <style:style style:name="表11.A1" style:family="table-cell">
      <style:table-cell-properties style:vertical-align="" fo:background-color="#fff0f6" fo:padding-left="0.191cm" fo:padding-right="0.191cm" fo:padding-top="0cm" fo:padding-bottom="0cm" fo:border="none">
        <style:background-image/>
      </style:table-cell-properties>
    </style:style>
    <style:style style:name="表12" style:family="table">
      <style:table-properties style:width="18.796cm" fo:margin-top="0cm" fo:margin-bottom="0cm" table:align="center" style:writing-mode="lr-tb"/>
    </style:style>
    <style:style style:name="表12.A" style:family="table-column">
      <style:table-column-properties style:column-width="18.796cm"/>
    </style:style>
    <style:style style:name="表12.1" style:family="table-row">
      <style:table-row-properties style:keep-together="false" fo:keep-together="always"/>
    </style:style>
    <style:style style:name="表12.A1" style:family="table-cell">
      <style:table-cell-properties style:vertical-align="" fo:background-color="#f3f3f3" fo:padding-left="0.191cm" fo:padding-right="0.191cm" fo:padding-top="0cm" fo:padding-bottom="0cm" fo:border="none">
        <style:background-image/>
      </style:table-cell-properties>
    </style:style>
    <style:style style:name="表13" style:family="table">
      <style:table-properties style:width="18.796cm" fo:margin-top="0cm" fo:margin-bottom="0cm" table:align="center" style:writing-mode="lr-tb"/>
    </style:style>
    <style:style style:name="表13.A" style:family="table-column">
      <style:table-column-properties style:column-width="18.796cm"/>
    </style:style>
    <style:style style:name="表13.1" style:family="table-row">
      <style:table-row-properties style:keep-together="false" fo:keep-together="always"/>
    </style:style>
    <style:style style:name="表13.A1" style:family="table-cell">
      <style:table-cell-properties style:vertical-align="" fo:background-color="#fff4e1" fo:padding-left="0.191cm" fo:padding-right="0.191cm" fo:padding-top="0cm" fo:padding-bottom="0cm" fo:border="none">
        <style:background-image/>
      </style:table-cell-properties>
    </style:style>
    <style:style style:name="表14" style:family="table">
      <style:table-properties style:width="18.796cm" fo:margin-top="0cm" fo:margin-bottom="0cm" table:align="center" style:writing-mode="lr-tb"/>
    </style:style>
    <style:style style:name="表14.A" style:family="table-column">
      <style:table-column-properties style:column-width="18.796cm"/>
    </style:style>
    <style:style style:name="表14.1" style:family="table-row">
      <style:table-row-properties style:keep-together="false" fo:keep-together="always"/>
    </style:style>
    <style:style style:name="表14.A1" style:family="table-cell">
      <style:table-cell-properties style:vertical-align="" fo:background-color="#eaf7ff" fo:padding-left="0.191cm" fo:padding-right="0.191cm" fo:padding-top="0cm" fo:padding-bottom="0cm" fo:border="none">
        <style:background-image/>
      </style:table-cell-properties>
    </style:style>
    <style:style style:name="表15" style:family="table">
      <style:table-properties style:width="18.796cm" fo:margin-top="0cm" fo:margin-bottom="0cm" table:align="center" style:writing-mode="lr-tb"/>
    </style:style>
    <style:style style:name="表15.A" style:family="table-column">
      <style:table-column-properties style:column-width="18.796cm"/>
    </style:style>
    <style:style style:name="表15.1" style:family="table-row">
      <style:table-row-properties style:keep-together="false" fo:keep-together="always"/>
    </style:style>
    <style:style style:name="表15.A1" style:family="table-cell">
      <style:table-cell-properties style:vertical-align="" fo:background-color="#f4ecff" fo:padding-left="0.191cm" fo:padding-right="0.191cm" fo:padding-top="0cm" fo:padding-bottom="0cm" fo:border="none">
        <style:background-image/>
      </style:table-cell-properties>
    </style:style>
    <style:style style:name="表16" style:family="table">
      <style:table-properties style:width="18.796cm" fo:margin-top="0cm" fo:margin-bottom="0cm" table:align="center" style:writing-mode="lr-tb"/>
    </style:style>
    <style:style style:name="表16.A" style:family="table-column">
      <style:table-column-properties style:column-width="18.796cm"/>
    </style:style>
    <style:style style:name="表16.1" style:family="table-row">
      <style:table-row-properties style:keep-together="false" fo:keep-together="always"/>
    </style:style>
    <style:style style:name="表16.A1" style:family="table-cell">
      <style:table-cell-properties style:vertical-align="" fo:background-color="#effff2" fo:padding-left="0.191cm" fo:padding-right="0.191cm" fo:padding-top="0cm" fo:padding-bottom="0cm" fo:border="none">
        <style:background-image/>
      </style:table-cell-properties>
    </style:style>
    <style:style style:name="表17" style:family="table">
      <style:table-properties style:width="18.796cm" fo:margin-top="0cm" fo:margin-bottom="0cm" table:align="center" style:writing-mode="lr-tb"/>
    </style:style>
    <style:style style:name="表17.A" style:family="table-column">
      <style:table-column-properties style:column-width="18.796cm"/>
    </style:style>
    <style:style style:name="表17.1" style:family="table-row">
      <style:table-row-properties style:keep-together="false" fo:keep-together="always"/>
    </style:style>
    <style:style style:name="表17.A1" style:family="table-cell">
      <style:table-cell-properties style:vertical-align="" fo:background-color="#fff0f6" fo:padding-left="0.191cm" fo:padding-right="0.191cm" fo:padding-top="0cm" fo:padding-bottom="0cm" fo:border="none">
        <style:background-image/>
      </style:table-cell-properties>
    </style:style>
    <style:style style:name="表18" style:family="table">
      <style:table-properties style:width="18.796cm" fo:margin-top="0cm" fo:margin-bottom="0cm" table:align="center" style:writing-mode="lr-tb"/>
    </style:style>
    <style:style style:name="表18.A" style:family="table-column">
      <style:table-column-properties style:column-width="18.796cm"/>
    </style:style>
    <style:style style:name="表18.1" style:family="table-row">
      <style:table-row-properties style:keep-together="false" fo:keep-together="always"/>
    </style:style>
    <style:style style:name="表18.A1" style:family="table-cell">
      <style:table-cell-properties style:vertical-align="" fo:background-color="#f3f3f3" fo:padding-left="0.191cm" fo:padding-right="0.191cm" fo:padding-top="0cm" fo:padding-bottom="0cm" fo:border="none">
        <style:background-image/>
      </style:table-cell-properties>
    </style:style>
    <style:style style:name="表19" style:family="table">
      <style:table-properties style:width="18.796cm" fo:margin-top="0cm" fo:margin-bottom="0cm" table:align="center" style:writing-mode="lr-tb"/>
    </style:style>
    <style:style style:name="表19.A" style:family="table-column">
      <style:table-column-properties style:column-width="18.796cm"/>
    </style:style>
    <style:style style:name="表19.1" style:family="table-row">
      <style:table-row-properties style:keep-together="false" fo:keep-together="always"/>
    </style:style>
    <style:style style:name="表19.A1" style:family="table-cell">
      <style:table-cell-properties style:vertical-align="" fo:background-color="#fff4e1" fo:padding-left="0.191cm" fo:padding-right="0.191cm" fo:padding-top="0cm" fo:padding-bottom="0cm" fo:border="none">
        <style:background-image/>
      </style:table-cell-properties>
    </style:style>
    <style:style style:name="表20" style:family="table">
      <style:table-properties style:width="18.796cm" fo:margin-top="0cm" fo:margin-bottom="0cm" table:align="center" style:writing-mode="lr-tb"/>
    </style:style>
    <style:style style:name="表20.A" style:family="table-column">
      <style:table-column-properties style:column-width="18.796cm"/>
    </style:style>
    <style:style style:name="表20.1" style:family="table-row">
      <style:table-row-properties style:keep-together="false" fo:keep-together="always"/>
    </style:style>
    <style:style style:name="表20.A1" style:family="table-cell">
      <style:table-cell-properties style:vertical-align="" fo:background-color="#eaf7ff" fo:padding-left="0.191cm" fo:padding-right="0.191cm" fo:padding-top="0cm" fo:padding-bottom="0cm" fo:border="none">
        <style:background-image/>
      </style:table-cell-properties>
    </style:style>
    <style:style style:name="表21" style:family="table">
      <style:table-properties style:width="18.796cm" fo:margin-top="0cm" fo:margin-bottom="0cm" table:align="center" style:writing-mode="lr-tb"/>
    </style:style>
    <style:style style:name="表21.A" style:family="table-column">
      <style:table-column-properties style:column-width="18.796cm"/>
    </style:style>
    <style:style style:name="表21.1" style:family="table-row">
      <style:table-row-properties style:keep-together="false" fo:keep-together="always"/>
    </style:style>
    <style:style style:name="表21.A1" style:family="table-cell">
      <style:table-cell-properties style:vertical-align="" fo:background-color="#f4ecff" fo:padding-left="0.191cm" fo:padding-right="0.191cm" fo:padding-top="0cm" fo:padding-bottom="0cm" fo:border="none">
        <style:background-image/>
      </style:table-cell-properties>
    </style:style>
    <style:style style:name="表22" style:family="table">
      <style:table-properties style:width="18.796cm" fo:margin-top="0cm" fo:margin-bottom="0cm" table:align="center" style:writing-mode="lr-tb"/>
    </style:style>
    <style:style style:name="表22.A" style:family="table-column">
      <style:table-column-properties style:column-width="18.796cm"/>
    </style:style>
    <style:style style:name="表22.1" style:family="table-row">
      <style:table-row-properties style:keep-together="false" fo:keep-together="always"/>
    </style:style>
    <style:style style:name="表22.A1" style:family="table-cell">
      <style:table-cell-properties style:vertical-align="" fo:background-color="#effff2" fo:padding-left="0.191cm" fo:padding-right="0.191cm" fo:padding-top="0cm" fo:padding-bottom="0cm" fo:border="none">
        <style:background-image/>
      </style:table-cell-properties>
    </style:style>
    <style:style style:name="表23" style:family="table">
      <style:table-properties style:width="18.796cm" fo:margin-top="0cm" fo:margin-bottom="0cm" table:align="center" style:writing-mode="lr-tb"/>
    </style:style>
    <style:style style:name="表23.A" style:family="table-column">
      <style:table-column-properties style:column-width="18.796cm"/>
    </style:style>
    <style:style style:name="表23.1" style:family="table-row">
      <style:table-row-properties style:keep-together="false" fo:keep-together="always"/>
    </style:style>
    <style:style style:name="表23.A1" style:family="table-cell">
      <style:table-cell-properties style:vertical-align="" fo:background-color="#fff0f6" fo:padding-left="0.191cm" fo:padding-right="0.191cm" fo:padding-top="0cm" fo:padding-bottom="0cm" fo:border="none">
        <style:background-image/>
      </style:table-cell-properties>
    </style:style>
    <style:style style:name="表24" style:family="table">
      <style:table-properties style:width="18.796cm" fo:margin-top="0cm" fo:margin-bottom="0cm" table:align="center" style:writing-mode="lr-tb"/>
    </style:style>
    <style:style style:name="表24.A" style:family="table-column">
      <style:table-column-properties style:column-width="18.796cm"/>
    </style:style>
    <style:style style:name="表24.1" style:family="table-row">
      <style:table-row-properties style:keep-together="false" fo:keep-together="always"/>
    </style:style>
    <style:style style:name="表24.A1" style:family="table-cell">
      <style:table-cell-properties style:vertical-align="" fo:background-color="#f3f3f3" fo:padding-left="0.191cm" fo:padding-right="0.191cm" fo:padding-top="0cm" fo:padding-bottom="0cm" fo:border="none">
        <style:background-image/>
      </style:table-cell-properties>
    </style:style>
    <style:style style:name="表25" style:family="table">
      <style:table-properties style:width="18.796cm" fo:margin-top="0cm" fo:margin-bottom="0cm" table:align="center" style:writing-mode="lr-tb"/>
    </style:style>
    <style:style style:name="表25.A" style:family="table-column">
      <style:table-column-properties style:column-width="18.796cm"/>
    </style:style>
    <style:style style:name="表25.1" style:family="table-row">
      <style:table-row-properties style:keep-together="false" fo:keep-together="always"/>
    </style:style>
    <style:style style:name="表25.A1" style:family="table-cell">
      <style:table-cell-properties style:vertical-align="" fo:background-color="#fff4e1" fo:padding-left="0.191cm" fo:padding-right="0.191cm" fo:padding-top="0cm" fo:padding-bottom="0cm" fo:border="none">
        <style:background-image/>
      </style:table-cell-properties>
    </style:style>
    <style:style style:name="表26" style:family="table">
      <style:table-properties style:width="18.796cm" fo:margin-top="0cm" fo:margin-bottom="0cm" table:align="center" style:writing-mode="lr-tb"/>
    </style:style>
    <style:style style:name="表26.A" style:family="table-column">
      <style:table-column-properties style:column-width="18.796cm"/>
    </style:style>
    <style:style style:name="表26.1" style:family="table-row">
      <style:table-row-properties style:keep-together="false" fo:keep-together="always"/>
    </style:style>
    <style:style style:name="表26.A1" style:family="table-cell">
      <style:table-cell-properties style:vertical-align="" fo:background-color="#eaf7ff" fo:padding-left="0.191cm" fo:padding-right="0.191cm" fo:padding-top="0cm" fo:padding-bottom="0cm" fo:border="none">
        <style:background-image/>
      </style:table-cell-properties>
    </style:style>
    <style:style style:name="表27" style:family="table">
      <style:table-properties style:width="18.796cm" fo:margin-top="0cm" fo:margin-bottom="0cm" table:align="center" style:writing-mode="lr-tb"/>
    </style:style>
    <style:style style:name="表27.A" style:family="table-column">
      <style:table-column-properties style:column-width="18.796cm"/>
    </style:style>
    <style:style style:name="表27.1" style:family="table-row">
      <style:table-row-properties style:keep-together="false" fo:keep-together="always"/>
    </style:style>
    <style:style style:name="表27.A1" style:family="table-cell">
      <style:table-cell-properties style:vertical-align="" fo:background-color="#f4ecff" fo:padding-left="0.191cm" fo:padding-right="0.191cm" fo:padding-top="0cm" fo:padding-bottom="0cm" fo:border="none">
        <style:background-image/>
      </style:table-cell-properties>
    </style:style>
    <style:style style:name="表28" style:family="table">
      <style:table-properties style:width="18.796cm" fo:margin-top="0cm" fo:margin-bottom="0cm" table:align="center" style:writing-mode="lr-tb"/>
    </style:style>
    <style:style style:name="表28.A" style:family="table-column">
      <style:table-column-properties style:column-width="18.796cm"/>
    </style:style>
    <style:style style:name="表28.1" style:family="table-row">
      <style:table-row-properties style:keep-together="false" fo:keep-together="always"/>
    </style:style>
    <style:style style:name="表28.A1" style:family="table-cell">
      <style:table-cell-properties style:vertical-align="" fo:background-color="#effff2" fo:padding-left="0.191cm" fo:padding-right="0.191cm" fo:padding-top="0cm" fo:padding-bottom="0cm" fo:border="none">
        <style:background-image/>
      </style:table-cell-properties>
    </style:style>
    <style:style style:name="表29" style:family="table">
      <style:table-properties style:width="18.796cm" fo:margin-top="0cm" fo:margin-bottom="0cm" table:align="center" style:writing-mode="lr-tb"/>
    </style:style>
    <style:style style:name="表29.A" style:family="table-column">
      <style:table-column-properties style:column-width="18.796cm"/>
    </style:style>
    <style:style style:name="表29.1" style:family="table-row">
      <style:table-row-properties style:keep-together="false" fo:keep-together="always"/>
    </style:style>
    <style:style style:name="表29.A1" style:family="table-cell">
      <style:table-cell-properties style:vertical-align="" fo:background-color="#fff0f6" fo:padding-left="0.191cm" fo:padding-right="0.191cm" fo:padding-top="0cm" fo:padding-bottom="0cm" fo:border="none">
        <style:background-image/>
      </style:table-cell-properties>
    </style:style>
    <style:style style:name="表30" style:family="table">
      <style:table-properties style:width="18.796cm" fo:margin-top="0cm" fo:margin-bottom="0cm" table:align="center" style:writing-mode="lr-tb"/>
    </style:style>
    <style:style style:name="表30.A" style:family="table-column">
      <style:table-column-properties style:column-width="18.796cm"/>
    </style:style>
    <style:style style:name="表30.1" style:family="table-row">
      <style:table-row-properties style:keep-together="false" fo:keep-together="always"/>
    </style:style>
    <style:style style:name="表30.A1" style:family="table-cell">
      <style:table-cell-properties style:vertical-align="" fo:background-color="#f3f3f3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282cm"/>
    </style:style>
    <style:style style:name="P2" style:family="paragraph" style:parent-style-name="Standard">
      <style:paragraph-properties fo:margin-top="0cm" fo:margin-bottom="0.106cm"/>
    </style:style>
    <style:style style:name="P3" style:family="paragraph" style:parent-style-name="Standard">
      <style:paragraph-properties fo:margin-top="0cm" fo:margin-bottom="0.035cm"/>
    </style:style>
    <style:style style:name="P4" style:family="paragraph" style:parent-style-name="Standard">
      <style:paragraph-properties fo:margin-top="0cm" fo:margin-bottom="0.035cm" fo:line-height="107%"/>
    </style:style>
    <style:style style:name="P5" style:family="paragraph" style:parent-style-name="Standard">
      <style:paragraph-properties fo:margin-top="0cm" fo:margin-bottom="0cm" fo:line-height="107%"/>
    </style:style>
    <style:style style:name="P6" style:family="paragraph" style:parent-style-name="Standard">
      <style:paragraph-properties fo:margin-top="0.071cm" fo:margin-bottom="0.035cm"/>
    </style:style>
    <style:style style:name="P7" style:family="paragraph" style:parent-style-name="Standard" style:master-page-name="Standard">
      <style:paragraph-properties fo:margin-top="0cm" fo:margin-bottom="0.071cm" fo:text-align="center" style:justify-single-word="false" style:page-number="auto"/>
      <style:text-properties fo:color="#6d3df2" fo:font-size="18pt" fo:font-weight="bold" style:font-size-asian="18pt" style:font-weight-asian="bold"/>
    </style:style>
    <style:style style:name="P8" style:family="paragraph" style:parent-style-name="Standard">
      <style:paragraph-properties fo:margin-top="0cm" fo:margin-bottom="0.071cm" fo:line-height="107%"/>
      <style:text-properties fo:color="#555555" fo:font-size="9.5pt" fo:font-style="italic" fo:font-weight="normal" style:font-size-asian="9.5pt" style:font-style-asian="italic" style:font-weight-asian="normal"/>
    </style:style>
    <style:style style:name="P9" style:family="paragraph" style:parent-style-name="Standard">
      <style:paragraph-properties fo:margin-top="0cm" fo:margin-bottom="0.282cm" fo:text-align="center" style:justify-single-word="false"/>
      <style:text-properties fo:font-size="10.5pt" fo:font-style="italic" style:font-size-asian="10.5pt" style:font-style-asian="italic"/>
    </style:style>
    <style:style style:name="P10" style:family="paragraph" style:parent-style-name="Standard">
      <style:paragraph-properties fo:margin-top="0cm" fo:margin-bottom="0.282cm"/>
      <style:text-properties fo:font-size="10.5pt" style:font-size-asian="10.5pt"/>
    </style:style>
    <style:style style:name="P11" style:family="paragraph" style:parent-style-name="Standard">
      <style:paragraph-properties fo:margin-top="0cm" fo:margin-bottom="0.035cm" fo:line-height="107%"/>
      <style:text-properties fo:font-size="10.5pt" style:font-size-asian="10.5pt"/>
    </style:style>
    <style:style style:name="P12" style:family="paragraph" style:parent-style-name="Standard">
      <style:paragraph-properties fo:margin-top="0.071cm" fo:margin-bottom="0cm"/>
      <style:text-properties fo:font-size="10.5pt" style:font-size-asian="10.5pt"/>
    </style:style>
    <style:style style:name="P13" style:family="paragraph" style:parent-style-name="Standard">
      <style:paragraph-properties fo:margin-top="0cm" fo:margin-bottom="0cm"/>
      <style:text-properties fo:font-size="10.5pt" style:font-size-asian="10.5pt"/>
    </style:style>
    <style:style style:name="P14" style:family="paragraph" style:parent-style-name="Standard">
      <style:paragraph-properties fo:margin-left="0.381cm" fo:margin-right="0cm" fo:margin-top="0cm" fo:margin-bottom="0cm" fo:text-indent="0cm" style:auto-text-indent="false"/>
      <style:text-properties fo:font-size="10.5pt" style:font-size-asian="10.5pt"/>
    </style:style>
    <style:style style:name="P15" style:family="paragraph" style:parent-style-name="Standard">
      <style:paragraph-properties fo:margin-top="0.071cm" fo:margin-bottom="0.035cm"/>
      <style:text-properties fo:font-size="10.5pt" style:font-size-asian="10.5pt"/>
    </style:style>
    <style:style style:name="T1" style:family="text">
      <style:text-properties fo:font-size="10.5pt" style:font-size-asian="10.5pt"/>
    </style:style>
    <style:style style:name="T2" style:family="text">
      <style:text-properties fo:font-size="10.5pt" style:font-size-asian="10.5pt" style:language-asian="ja" style:country-asian="JP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fo:color="#555555" fo:font-size="9.5pt" fo:font-style="italic" style:font-size-asian="9.5pt" style:font-style-asian="italic"/>
    </style:style>
    <style:style style:name="T5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ttilio's English Exercises - Set 5</text:p>
      <text:p text:style-name="P9">30 questions: open question + multiple choice, always alternating</text:p>
      <text:p text:style-name="P1"><text:span text:style-name="T1">Name: </text:span><text:span text:style-name="T2">______ATTILIO__________________________</text:span><text:span text:style-name="T1"> <text:s text:c="3"/>Date: </text:span><text:span text:style-name="T2">____________5 Luglio 2026____________________</text:span></text:p>
      <text:p text:style-name="P10">Read slowly. Each question gives you the information you need. For multiple choice questions, choose only one answer: A, B or C.</text:p>
      <table:table table:name="表1" table:style-name="表1">
        <table:table-column table:style-name="表1.A"/>
        <table:table-row table:style-name="表1.1">
          <table:table-cell table:style-name="表1.A1" office:value-type="string">
            <text:p text:style-name="P2"><text:span text:style-name="T3">1. This, that, these, those <text:s/></text:span><text:span text:style-name="T4">(Open question)</text:span></text:p>
            <text:p text:style-name="P11">Look at the number and the distance. Use this, that, these or those.</text:p>
            <text:p text:style-name="P5"/>
            <text:p text:style-name="P4"><text:span text:style-name="T1">Near me + one thing: </text:span><text:span text:style-name="T2">___this__</text:span><text:span text:style-name="T1"> pencil.</text:span></text:p>
            <text:p text:style-name="P4"><text:span text:style-name="T1">Far from me + one thing: </text:span><text:span text:style-name="T2">__that___</text:span><text:span text:style-name="T1"> book.</text:span></text:p>
            <text:p text:style-name="P4"><text:span text:style-name="T1">Near me + more than one thing: </text:span><text:span text:style-name="T2">___these___</text:span><text:span text:style-name="T1"> pens.</text:span></text:p>
            <text:p text:style-name="P4"><text:span text:style-name="T1">Far from me + more than one thing: </text:span><text:span text:style-name="T2">____those__</text:span><text:span text:style-name="T1"> bags.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2" table:style-name="表2">
        <table:table-column table:style-name="表2.A"/>
        <table:table-row table:style-name="表2.1">
          <table:table-cell table:style-name="表2.A1" office:value-type="string">
            <text:p text:style-name="P2"><text:span text:style-name="T3">2. This or that? <text:s/></text:span><text:span text:style-name="T4">(Multiple choice)</text:span></text:p>
            <text:p text:style-name="P11">You are holding one apple in your hand. The apple is near you. Choose the correct sentence.</text:p>
            <text:p text:style-name="P8">Choose ONE answer. Write A, B or C on the answer line.</text:p>
            <text:p text:style-name="P14">A) This is my apple.</text:p>
            <text:p text:style-name="P14">B) That are my apple.</text:p>
            <text:p text:style-name="P14">C) These is my apple.</text:p>
            <text:p text:style-name="P6"><text:span text:style-name="T1">Answer: </text:span><text:span text:style-name="T2">______a__________________________</text:span></text:p>
          </table:table-cell>
        </table:table-row>
      </table:table>
      <text:p text:style-name="P3"/>
      <table:table table:name="表3" table:style-name="表3">
        <table:table-column table:style-name="表3.A"/>
        <table:table-row table:style-name="表3.1">
          <table:table-cell table:style-name="表3.A1" office:value-type="string">
            <text:p text:style-name="P2"><text:span text:style-name="T3">3. Irregular plural nouns <text:s/></text:span><text:span text:style-name="T4">(Open question)</text:span></text:p>
            <text:p text:style-name="P11">Some plural nouns are not made with only -s. Write the plural form.</text:p>
            <text:p text:style-name="P5"/>
            <text:p text:style-name="P4"><text:span text:style-name="T1">one child -&gt; two </text:span><text:span text:style-name="T2">__children____</text:span></text:p>
            <text:p text:style-name="P4"><text:span text:style-name="T1">one man -&gt; two </text:span><text:span text:style-name="T2">___men___</text:span></text:p>
            <text:p text:style-name="P4"><text:span text:style-name="T1">one woman -&gt; two </text:span><text:span text:style-name="T2">__wemen___</text:span></text:p>
            <text:p text:style-name="P4"><text:span text:style-name="T1">one mouse -&gt; two </text:span><text:span text:style-name="T2">__mice____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2"><text:span text:style-name="T3">4. One foot, two... <text:s/></text:span><text:span text:style-name="T4">(Multiple choice)</text:span></text:p>
            <text:p text:style-name="P11">Choose the correct plural noun.</text:p>
            <text:p text:style-name="P5"/>
            <text:p text:style-name="P4"><text:span text:style-name="T1">one foot -&gt; two </text:span><text:span text:style-name="T2">_feet_____</text:span></text:p>
            <text:p text:style-name="P8">Choose ONE answer. Write A, B or C on the answer line.</text:p>
            <text:p text:style-name="P14">A) foots</text:p>
            <text:p text:style-name="P14">B) feets</text:p>
            <text:p text:style-name="P14">C) feet</text:p>
            <text:p text:style-name="P15">Answer: ________________________________</text:p>
          </table:table-cell>
        </table:table-row>
      </table:table>
      <text:p text:style-name="P3"/>
      <table:table table:name="表5" table:style-name="表5">
        <table:table-column table:style-name="表5.A"/>
        <text:soft-page-break/>
        <table:table-row table:style-name="表5.1">
          <table:table-cell table:style-name="表5.A1" office:value-type="string">
            <text:p text:style-name="P2"><text:span text:style-name="T3">5. Next to, under, on <text:s/></text:span><text:span text:style-name="T4">(Open question)</text:span></text:p>
            <text:p text:style-name="P11">Use next to, under or on. Read each sentence carefully.</text:p>
            <text:p text:style-name="P5"/>
            <text:p text:style-name="P4"><text:span text:style-name="T1">The lamp is </text:span><text:span text:style-name="T2">_on_____</text:span><text:span text:style-name="T1"> the table. It is touching the top of the table.</text:span></text:p>
            <text:p text:style-name="P4"><text:span text:style-name="T1">The ball is </text:span><text:span text:style-name="T2">___under___</text:span><text:span text:style-name="T1"> the table. It is below the table.</text:span></text:p>
            <text:p text:style-name="P4"><text:span text:style-name="T1">The chair is </text:span><text:span text:style-name="T2">____next__</text:span><text:span text:style-name="T1"> the desk. It is beside the desk.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2"><text:span text:style-name="T3">6. On <text:s/></text:span><text:span text:style-name="T4">(Multiple choice)</text:span></text:p>
            <text:p text:style-name="P11">The cat is sitting on the chair. What does on mean here?</text:p>
            <text:p text:style-name="P8">Choose ONE answer. Write A, B or C on the answer line.</text:p>
            <text:p text:style-name="P14">A) The cat is below the chair.</text:p>
            <text:p text:style-name="P14">B) The cat is on top of the chair.</text:p>
            <text:p text:style-name="P14">C) The cat is beside the chair.</text:p>
            <text:p text:style-name="P6"><text:span text:style-name="T1">Answer: </text:span><text:span text:style-name="T2">_____b___________________________</text:span></text:p>
          </table:table-cell>
        </table:table-row>
      </table:table>
      <text:p text:style-name="P3"/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2"><text:span text:style-name="T3">7. Personal pronouns <text:s/></text:span><text:span text:style-name="T4">(Open question)</text:span></text:p>
            <text:p text:style-name="P11">Replace the words with he, she, it or they.</text:p>
            <text:p text:style-name="P5"/>
            <text:p text:style-name="P4"><text:span text:style-name="T1">Tom -&gt; </text:span><text:span text:style-name="T2">___he___</text:span></text:p>
            <text:p text:style-name="P4"><text:span text:style-name="T1">Anna -&gt; </text:span><text:span text:style-name="T2">____she__</text:span></text:p>
            <text:p text:style-name="P4"><text:span text:style-name="T1">Tom and Anna -&gt; </text:span><text:span text:style-name="T2">_they_____</text:span></text:p>
            <text:p text:style-name="P4"><text:span text:style-name="T1">the dog -&gt; </text:span><text:span text:style-name="T2">__it____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8" table:style-name="表8">
        <table:table-column table:style-name="表8.A"/>
        <table:table-row table:style-name="表8.1">
          <table:table-cell table:style-name="表8.A1" office:value-type="string">
            <text:p text:style-name="P2"><text:span text:style-name="T3">8. Tom and I <text:s/></text:span><text:span text:style-name="T4">(Multiple choice)</text:span></text:p>
            <text:p text:style-name="P11">Tom and I are speaking. Which pronoun replaces Tom and I?</text:p>
            <text:p text:style-name="P8">Choose ONE answer. Write A, B or C on the answer line.</text:p>
            <text:p text:style-name="P14">A) They</text:p>
            <text:p text:style-name="P14">B) You</text:p>
            <text:p text:style-name="P14">C) We</text:p>
            <text:p text:style-name="P6"><text:span text:style-name="T1">Answer: </text:span><text:span text:style-name="T2">_____c___________________________</text:span></text:p>
          </table:table-cell>
        </table:table-row>
      </table:table>
      <text:p text:style-name="P3"/>
      <table:table table:name="表9" table:style-name="表9">
        <table:table-column table:style-name="表9.A"/>
        <table:table-row table:style-name="表9.1">
          <table:table-cell table:style-name="表9.A1" office:value-type="string">
            <text:p text:style-name="P2"><text:span text:style-name="T3">9. The verb be <text:s/></text:span><text:span text:style-name="T4">(Open question)</text:span></text:p>
            <text:p text:style-name="P11">Complete with am, is or are.</text:p>
            <text:p text:style-name="P5"/>
            <text:p text:style-name="P4"><text:span text:style-name="T1">I </text:span><text:span text:style-name="T2">__am____</text:span><text:span text:style-name="T1"> nine years old.</text:span></text:p>
            <text:p text:style-name="P4"><text:span text:style-name="T1">You </text:span><text:span text:style-name="T2">____are__</text:span><text:span text:style-name="T1"> happy.</text:span></text:p>
            <text:p text:style-name="P4"><text:span text:style-name="T1">He </text:span><text:span text:style-name="T2">___is___</text:span><text:span text:style-name="T1"> at school.</text:span></text:p>
            <text:p text:style-name="P4"><text:span text:style-name="T1">They </text:span><text:span text:style-name="T2">____are__</text:span><text:span text:style-name="T1"> friends.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10" table:style-name="表10">
        <table:table-column table:style-name="表10.A"/>
        <text:soft-page-break/>
        <table:table-row table:style-name="表10.1">
          <table:table-cell table:style-name="表10.A1" office:value-type="string">
            <text:p text:style-name="P2"><text:span text:style-name="T3">10. She... <text:s/></text:span><text:span text:style-name="T4">(Multiple choice)</text:span></text:p>
            <text:p text:style-name="P11">Choose the correct sentence.</text:p>
            <text:p text:style-name="P8">Choose ONE answer. Write A, B or C on the answer line.</text:p>
            <text:p text:style-name="P14">A) She are my friend.</text:p>
            <text:p text:style-name="P14">B) She is my friend.</text:p>
            <text:p text:style-name="P14">C) She am my friend.</text:p>
            <text:p text:style-name="P6"><text:span text:style-name="T1">Answer: </text:span><text:span text:style-name="T2">_________________b_______________</text:span></text:p>
          </table:table-cell>
        </table:table-row>
      </table:table>
      <text:p text:style-name="P3"/>
      <table:table table:name="表11" table:style-name="表11">
        <table:table-column table:style-name="表11.A"/>
        <table:table-row table:style-name="表11.1">
          <table:table-cell table:style-name="表11.A1" office:value-type="string">
            <text:p text:style-name="P2"><text:span text:style-name="T3">11. Can and cannot <text:s/></text:span><text:span text:style-name="T4">(Open question)</text:span></text:p>
            <text:p text:style-name="P11">Use can for something possible. Use cannot for something not possible.</text:p>
            <text:p text:style-name="P5"/>
            <text:p text:style-name="P4"><text:span text:style-name="T1">I </text:span><text:span text:style-name="T2">__can____</text:span><text:span text:style-name="T1"> write with a pencil.</text:span></text:p>
            <text:p text:style-name="P4"><text:span text:style-name="T1">A fish </text:span><text:span text:style-name="T2">____cant__</text:span><text:span text:style-name="T1"> fly.</text:span></text:p>
            <text:p text:style-name="P4"><text:span text:style-name="T1">A bird </text:span><text:span text:style-name="T2">____can__</text:span><text:span text:style-name="T1"> fly.</text:span></text:p>
            <text:p text:style-name="P4"><text:span text:style-name="T1">A baby </text:span><text:span text:style-name="T2">___cant___</text:span><text:span text:style-name="T1"> drive a car.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12" table:style-name="表12">
        <table:table-column table:style-name="表12.A"/>
        <table:table-row table:style-name="表12.1">
          <table:table-cell table:style-name="表12.A1" office:value-type="string">
            <text:p text:style-name="P2"><text:span text:style-name="T3">12. Can you...? <text:s/></text:span><text:span text:style-name="T4">(Multiple choice)</text:span></text:p>
            <text:p text:style-name="P11">Choose the sentence that asks about ability.</text:p>
            <text:p text:style-name="P8">Choose ONE answer. Write A, B or C on the answer line.</text:p>
            <text:p text:style-name="P14">A) Can you ride a bike?</text:p>
            <text:p text:style-name="P14">B) Are you ride a bike?</text:p>
            <text:p text:style-name="P14">C) Have you ride a bike?</text:p>
            <text:p text:style-name="P6"><text:span text:style-name="T1">Answer: </text:span><text:span text:style-name="T2">__________a______________________</text:span></text:p>
          </table:table-cell>
        </table:table-row>
      </table:table>
      <text:p text:style-name="P3"/>
      <table:table table:name="表13" table:style-name="表13">
        <table:table-column table:style-name="表13.A"/>
        <table:table-row table:style-name="表13.1">
          <table:table-cell table:style-name="表13.A1" office:value-type="string">
            <text:p text:style-name="P2"><text:span text:style-name="T3">13. His and her <text:s/></text:span><text:span text:style-name="T4">(Open question)</text:span></text:p>
            <text:p text:style-name="P11">Use his for a boy or a man. Use her for a girl or a woman.</text:p>
            <text:p text:style-name="P5"/>
            <text:p text:style-name="P4"><text:span text:style-name="T1">This is Marco. </text:span><text:span text:style-name="T2">___his___</text:span><text:span text:style-name="T1"> bag is blue.</text:span></text:p>
            <text:p text:style-name="P4"><text:span text:style-name="T1">This is Sara. </text:span><text:span text:style-name="T2">___her___</text:span><text:span text:style-name="T1"> pen is red.</text:span></text:p>
            <text:p text:style-name="P4"><text:span text:style-name="T1">This is my father. </text:span><text:span text:style-name="T2">__his____</text:span><text:span text:style-name="T1"> car is black.</text:span></text:p>
            <text:p text:style-name="P4"><text:span text:style-name="T1">This is my mother. </text:span><text:span text:style-name="T2">__her____</text:span><text:span text:style-name="T1"> phone is new.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14" table:style-name="表14">
        <table:table-column table:style-name="表14.A"/>
        <table:table-row table:style-name="表14.1">
          <table:table-cell table:style-name="表14.A1" office:value-type="string">
            <text:p text:style-name="P2"><text:span text:style-name="T3">14. Anna and her cat <text:s/></text:span><text:span text:style-name="T4">(Multiple choice)</text:span></text:p>
            <text:p text:style-name="P11">Anna has a cat. Complete the sentence.</text:p>
            <text:p text:style-name="P5"/>
            <text:p text:style-name="P11"><text:span text:style-name="T5">__her____</text:span> cat is white.</text:p>
            <text:p text:style-name="P8">Choose ONE answer. Write A, B or C on the answer line.</text:p>
            <text:p text:style-name="P14">A) His</text:p>
            <text:p text:style-name="P14">B) Her</text:p>
            <text:p text:style-name="P14">C) He</text:p>
            <text:p text:style-name="P6"><text:span text:style-name="T1">Answer: </text:span><text:span text:style-name="T2">_____b___________________________</text:span></text:p>
          </table:table-cell>
        </table:table-row>
      </table:table>
      <text:p text:style-name="P3"/>
      <table:table table:name="表15" table:style-name="表15">
        <table:table-column table:style-name="表15.A"/>
        <text:soft-page-break/>
        <table:table-row table:style-name="表15.1">
          <table:table-cell table:style-name="表15.A1" office:value-type="string">
            <text:p text:style-name="P2"><text:span text:style-name="T3">15. Have got and has got <text:s/></text:span><text:span text:style-name="T4">(Open question)</text:span></text:p>
            <text:p text:style-name="P11">Use have got with I, you, we and they. Use has got with he, she and it.</text:p>
            <text:p text:style-name="P5"/>
            <text:p text:style-name="P11">I <text:span text:style-name="T5">___have got___</text:span> a pencil.</text:p>
            <text:p text:style-name="P11">She <text:span text:style-name="T5">___has got___</text:span> a bike.</text:p>
            <text:p text:style-name="P11">They <text:span text:style-name="T5">__have got____</text:span> books.</text:p>
            <text:p text:style-name="P11">He <text:span text:style-name="T5">__has got____</text:span> a dog.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16" table:style-name="表16">
        <table:table-column table:style-name="表16.A"/>
        <table:table-row table:style-name="表16.1">
          <table:table-cell table:style-name="表16.A1" office:value-type="string">
            <text:p text:style-name="P2"><text:span text:style-name="T3">16. He has got <text:s/></text:span><text:span text:style-name="T4">(Multiple choice)</text:span></text:p>
            <text:p text:style-name="P11">Choose the correct sentence.</text:p>
            <text:p text:style-name="P8">Choose ONE answer. Write A, B or C on the answer line.</text:p>
            <text:p text:style-name="P14">A) He have got a ruler.</text:p>
            <text:p text:style-name="P14">B) He has get a ruler.</text:p>
            <text:p text:style-name="P14">C) He has got a ruler.</text:p>
            <text:p text:style-name="P15">Answer: <text:span text:style-name="T5">_c_______________________________</text:span></text:p>
          </table:table-cell>
        </table:table-row>
      </table:table>
      <text:p text:style-name="P3"/>
      <table:table table:name="表17" table:style-name="表17">
        <table:table-column table:style-name="表17.A"/>
        <table:table-row table:style-name="表17.1">
          <table:table-cell table:style-name="表17.A1" office:value-type="string">
            <text:p text:style-name="P2"><text:span text:style-name="T3">17. Mine, yours, hers, ours <text:s/></text:span><text:span text:style-name="T4">(Open question)</text:span></text:p>
            <text:p text:style-name="P11">Do not repeat the noun. Use mine, yours, hers or ours.</text:p>
            <text:p text:style-name="P5"/>
            <text:p text:style-name="P11">This is my jacket. It is <text:span text:style-name="T5">__mine____.</text:span></text:p>
            <text:p text:style-name="P11">This is your book. It is <text:span text:style-name="T5">___yours___.</text:span></text:p>
            <text:p text:style-name="P11">This is her bag. It is <text:span text:style-name="T5">___hers___.</text:span></text:p>
            <text:p text:style-name="P11">This is our house. It is <text:span text:style-name="T5">___ours___.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18" table:style-name="表18">
        <table:table-column table:style-name="表18.A"/>
        <table:table-row table:style-name="表18.1">
          <table:table-cell table:style-name="表18.A1" office:value-type="string">
            <text:p text:style-name="P2"><text:span text:style-name="T3">18. Whose bike? <text:s/></text:span><text:span text:style-name="T4">(Multiple choice)</text:span></text:p>
            <text:p text:style-name="P11">The blue bike belongs to Tom. Complete the sentence.</text:p>
            <text:p text:style-name="P5"/>
            <text:p text:style-name="P11">The blue bike is <text:span text:style-name="T5">__hers,his____.</text:span></text:p>
            <text:p text:style-name="P8">Choose ONE answer. Write A, B or C on the answer line.</text:p>
            <text:p text:style-name="P14">A) hers</text:p>
            <text:p text:style-name="P14">B) his</text:p>
            <text:p text:style-name="P14">C) theirs</text:p>
            <text:p text:style-name="P15">Answer: ________________________________</text:p>
          </table:table-cell>
        </table:table-row>
      </table:table>
      <text:p text:style-name="P3"/>
      <table:table table:name="表19" table:style-name="表19">
        <table:table-column table:style-name="表19.A"/>
        <table:table-row table:style-name="表19.1">
          <table:table-cell table:style-name="表19.A1" office:value-type="string">
            <text:p text:style-name="P2"><text:span text:style-name="T3">19. Near or far? <text:s/></text:span><text:span text:style-name="T4">(Open question)</text:span></text:p>
            <text:p text:style-name="P11">Use this, that, these or those.</text:p>
            <text:p text:style-name="P5"/>
            <text:p text:style-name="P11">Near me + one thing: <text:span text:style-name="T5">___this___</text:span> is my desk.</text:p>
            <text:p text:style-name="P11">Near me + more than one thing: <text:span text:style-name="T5">____these__</text:span> are my shoes.</text:p>
            <text:p text:style-name="P11">Far from me + one thing: <text:span text:style-name="T5">___that___</text:span> is the moon.</text:p>
            <text:p text:style-name="P11">Far from me + more than one thing: <text:span text:style-name="T5">___those___</text:span> are the mountains.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20" table:style-name="表20">
        <table:table-column table:style-name="表20.A"/>
        <text:soft-page-break/>
        <table:table-row table:style-name="表20.1">
          <table:table-cell table:style-name="表20.A1" office:value-type="string">
            <text:p text:style-name="P2"><text:span text:style-name="T3">20. Two books far away <text:s/></text:span><text:span text:style-name="T4">(Multiple choice)</text:span></text:p>
            <text:p text:style-name="P11">You point to two books far from you. Choose the correct words.</text:p>
            <text:p text:style-name="P8">Choose ONE answer. Write A, B or C on the answer line.</text:p>
            <text:p text:style-name="P14">A) these books</text:p>
            <text:p text:style-name="P14">B) that books</text:p>
            <text:p text:style-name="P14">C) those books</text:p>
            <text:p text:style-name="P15">Answer: <text:span text:style-name="T5">__c______________________________</text:span></text:p>
          </table:table-cell>
        </table:table-row>
      </table:table>
      <text:p text:style-name="P3"/>
      <table:table table:name="表21" table:style-name="表21">
        <table:table-column table:style-name="表21.A"/>
        <table:table-row table:style-name="表21.1">
          <table:table-cell table:style-name="表21.A1" office:value-type="string">
            <text:p text:style-name="P2"><text:span text:style-name="T3">21. More irregular plurals <text:s/></text:span><text:span text:style-name="T4">(Open question)</text:span></text:p>
            <text:p text:style-name="P11">Write the plural form. Be careful: one word does not change.</text:p>
            <text:p text:style-name="P5"/>
            <text:p text:style-name="P11">one tooth -&gt; two <text:span text:style-name="T5">__feet____</text:span></text:p>
            <text:p text:style-name="P11">one person -&gt; two <text:span text:style-name="T5">__people____</text:span></text:p>
            <text:p text:style-name="P11">one goose -&gt; two <text:span text:style-name="T5">___gooses___</text:span></text:p>
            <text:p text:style-name="P11">one sheep -&gt; two <text:span text:style-name="T5">__sheeps____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22" table:style-name="表22">
        <table:table-column table:style-name="表22.A"/>
        <table:table-row table:style-name="表22.1">
          <table:table-cell table:style-name="表22.A1" office:value-type="string">
            <text:p text:style-name="P2"><text:span text:style-name="T3">22. One mouse, two... <text:s/></text:span><text:span text:style-name="T4">(Multiple choice)</text:span></text:p>
            <text:p text:style-name="P11">Choose the correct plural noun.</text:p>
            <text:p text:style-name="P5"/>
            <text:p text:style-name="P11">one mouse -&gt; two <text:span text:style-name="T5">___a___</text:span></text:p>
            <text:p text:style-name="P8">Choose ONE answer. Write A, B or C on the answer line.</text:p>
            <text:p text:style-name="P14">A) mice</text:p>
            <text:p text:style-name="P14">B) mouses</text:p>
            <text:p text:style-name="P14">C) mousees</text:p>
            <text:p text:style-name="P15">Answer: <text:span text:style-name="T5">___________a_____________________</text:span></text:p>
          </table:table-cell>
        </table:table-row>
      </table:table>
      <text:p text:style-name="P3"/>
      <table:table table:name="表23" table:style-name="表23">
        <table:table-column table:style-name="表23.A"/>
        <table:table-row table:style-name="表23.1">
          <table:table-cell table:style-name="表23.A1" office:value-type="string">
            <text:p text:style-name="P2"><text:span text:style-name="T3">23. Pronoun + be <text:s/></text:span><text:span text:style-name="T4">(Open question)</text:span></text:p>
            <text:p text:style-name="P11">Change the name to a pronoun. Then complete the sentence with am, is or are.</text:p>
            <text:p text:style-name="P5"/>
            <text:p text:style-name="P11">Luca is ten. -&gt; <text:span text:style-name="T5">____he is </text:span><text:s/>______ ten.</text:p>
            <text:p text:style-name="P11">Maria is at home. -&gt; <text:span text:style-name="T5">__she is ____</text:span> ______ at home.</text:p>
            <text:p text:style-name="P11">Luca and Maria are friends. -&gt; <text:span text:style-name="T5">_they are_____</text:span> ______ friends.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24" table:style-name="表24">
        <table:table-column table:style-name="表24.A"/>
        <table:table-row table:style-name="表24.1">
          <table:table-cell table:style-name="表24.A1" office:value-type="string">
            <text:p text:style-name="P2"><text:span text:style-name="T3">24. I am / you are <text:s/></text:span><text:span text:style-name="T4">(Multiple choice)</text:span></text:p>
            <text:p text:style-name="P11">Choose the correct pair.</text:p>
            <text:p text:style-name="P8">Choose ONE answer. Write A, B or C on the answer line.</text:p>
            <text:p text:style-name="P14">A) I is / you am</text:p>
            <text:p text:style-name="P14">B) I am / you are</text:p>
            <text:p text:style-name="P14">C) I are / you is</text:p>
            <text:p text:style-name="P15">Answer: <text:span text:style-name="T5">__b______________________________</text:span></text:p>
          </table:table-cell>
        </table:table-row>
      </table:table>
      <text:p text:style-name="P3"/>
      <table:table table:name="表25" table:style-name="表25">
        <table:table-column table:style-name="表25.A"/>
        <text:soft-page-break/>
        <table:table-row table:style-name="表25.1">
          <table:table-cell table:style-name="表25.A1" office:value-type="string">
            <text:p text:style-name="P2"><text:span text:style-name="T3">25. Write three sentences <text:s/></text:span><text:span text:style-name="T4">(Open question)</text:span></text:p>
            <text:p text:style-name="P11">Write three short sentences.</text:p>
            <text:p text:style-name="P5"/>
            <text:p text:style-name="P11">1) Write one sentence with can.</text:p>
            <text:p text:style-name="P11">2) Write one sentence with cannot or can't.</text:p>
            <text:p text:style-name="P11">3) Write one sentence with his or her.</text:p>
            <text:p text:style-name="P5"/>
            <text:p text:style-name="P11">Example: I can swim.</text:p>
            <text:p text:style-name="P12">Answer: <text:span text:style-name="T5">___1 <text:s/>I can play football <text:s/>2 <text:s/>I cannot play rugby <text:s text:c="3"/>3 <text:s text:c="2"/>this is her bag_____________________________________________________________</text:span></text:p>
            <text:p text:style-name="P13">________________________________________________________________</text:p>
          </table:table-cell>
        </table:table-row>
      </table:table>
      <text:p text:style-name="P3"/>
      <table:table table:name="表26" table:style-name="表26">
        <table:table-column table:style-name="表26.A"/>
        <table:table-row table:style-name="表26.1">
          <table:table-cell table:style-name="表26.A1" office:value-type="string">
            <text:p text:style-name="P2"><text:span text:style-name="T3">26. Can + verb <text:s/></text:span><text:span text:style-name="T4">(Multiple choice)</text:span></text:p>
            <text:p text:style-name="P11">Remember: after can, use the verb without -s. Choose the correct sentence.</text:p>
            <text:p text:style-name="P8">Choose ONE answer. Write A, B or C on the answer line.</text:p>
            <text:p text:style-name="P14">A) Tom can play tennis.</text:p>
            <text:p text:style-name="P14">B) Anna can plays tennis.</text:p>
            <text:p text:style-name="P14">C) Tom cans play tennis.</text:p>
            <text:p text:style-name="P15">Answer: <text:span text:style-name="T5">____b____________________________</text:span></text:p>
          </table:table-cell>
        </table:table-row>
      </table:table>
      <text:p text:style-name="P3"/>
      <table:table table:name="表27" table:style-name="表27">
        <table:table-column table:style-name="表27.A"/>
        <table:table-row table:style-name="表27.1">
          <table:table-cell table:style-name="表27.A1" office:value-type="string">
            <text:p text:style-name="P2"><text:span text:style-name="T3">27. Haven't got / hasn't got <text:s/></text:span><text:span text:style-name="T4">(Open question)</text:span></text:p>
            <text:p text:style-name="P11">Make the sentences negative.</text:p>
            <text:p text:style-name="P5"/>
            <text:p text:style-name="P11">I have got a ruler. -&gt; I <text:span text:style-name="T5">__haven t_got___</text:span> a ruler.</text:p>
            <text:p text:style-name="P11">She has got a dog. -&gt; She <text:span text:style-name="T5">_hasn t__got___</text:span> a dog.</text:p>
            <text:p text:style-name="P11">They have got bikes. -&gt; They <text:span text:style-name="T5">_haven <text:s/>t got_____</text:span> bikes.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28" table:style-name="表28">
        <table:table-column table:style-name="表28.A"/>
        <table:table-row table:style-name="表28.1">
          <table:table-cell table:style-name="表28.A1" office:value-type="string">
            <text:p text:style-name="P2"><text:span text:style-name="T3">28. Has she got...? <text:s/></text:span><text:span text:style-name="T4">(Multiple choice)</text:span></text:p>
            <text:p text:style-name="P11">Choose the correct question.</text:p>
            <text:p text:style-name="P8">Choose ONE answer. Write A, B or C on the answer line.</text:p>
            <text:p text:style-name="P14">A) Has you got a pencil?</text:p>
            <text:p text:style-name="P14">B) Have she got a pencil?</text:p>
            <text:p text:style-name="P14">C) Has she got a pencil?</text:p>
            <text:p text:style-name="P15">Answer: <text:span text:style-name="T5">____c____________________________</text:span></text:p>
          </table:table-cell>
        </table:table-row>
      </table:table>
      <text:p text:style-name="P3"/>
      <table:table table:name="表29" table:style-name="表29">
        <table:table-column table:style-name="表29.A"/>
        <table:table-row table:style-name="表29.1">
          <table:table-cell table:style-name="表29.A1" office:value-type="string">
            <text:p text:style-name="P2"><text:span text:style-name="T3">29. Possessive pronouns <text:s/></text:span><text:span text:style-name="T4">(Open question)</text:span></text:p>
            <text:p text:style-name="P11">Do not repeat the noun. Use mine, yours, his or theirs.</text:p>
            <text:p text:style-name="P5"/>
            <text:p text:style-name="P11">This pen is my pen. It is <text:span text:style-name="T5">__mine____.</text:span></text:p>
            <text:p text:style-name="P11">This ball is your ball. It is <text:span text:style-name="T5">___yours___.</text:span></text:p>
            <text:p text:style-name="P11">This coat belongs to Ben. It is <text:span text:style-name="T5">__his___.</text:span></text:p>
            <text:p text:style-name="P11">These toys belong to Tom and Anna. They are <text:span text:style-name="T5">_theirs_____.</text:span></text:p>
            <text:p text:style-name="P12">Answer: ________________________________________________________________</text:p>
            <text:p text:style-name="P13">________________________________________________________________</text:p>
          </table:table-cell>
        </table:table-row>
      </table:table>
      <text:p text:style-name="P3"/>
      <table:table table:name="表30" table:style-name="表30">
        <table:table-column table:style-name="表30.A"/>
        <text:soft-page-break/>
        <table:table-row table:style-name="表30.1">
          <table:table-cell table:style-name="表30.A1" office:value-type="string">
            <text:p text:style-name="P2"><text:span text:style-name="T3">30. Our classroom <text:s/></text:span><text:span text:style-name="T4">(Multiple choice)</text:span></text:p>
            <text:p text:style-name="P11">This is our classroom. Complete the sentence.</text:p>
            <text:p text:style-name="P5"/>
            <text:p text:style-name="P11">The classroom is <text:span text:style-name="T5">___ours___.</text:span></text:p>
            <text:p text:style-name="P8">Choose ONE answer. Write A, B or C on the answer line.</text:p>
            <text:p text:style-name="P14">A) ours</text:p>
            <text:p text:style-name="P14">B) theirs</text:p>
            <text:p text:style-name="P14">C) mine</text:p>
            <text:p text:style-name="P15">Answer: ________________________________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MS PMincho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ptos" fo:font-size="10.5pt" style:font-name-asian="Apto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397cm" fo:margin-right="1.39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6-07-08T19:59:45.21</dc:date>
    <meta:editing-duration>PT22H54M48S</meta:editing-duration>
    <meta:generator>OpenOffice/4.1.11$Win32 OpenOffice.org_project/4111m1$Build-9808</meta:generator>
    <dc:creator>MEGUMI NIHSIYA </dc:creator>
    <meta:document-statistic meta:table-count="30" meta:image-count="0" meta:object-count="0" meta:page-count="7" meta:paragraph-count="231" meta:word-count="1379" meta:character-count="93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